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svg="urn:oasis:names:tc:opendocument:xmlns:svg-compatible:1.0" office:version="1.2">
  <office:automatic-styles>
    <style:style style:name="col_rag_0" style:family="table-column">
      <style:table-column-properties style:column-width="3.4cm"/>
    </style:style>
    <style:style style:name="col_rag_1" style:family="table-column">
      <style:table-column-properties style:column-width="3.0cm"/>
    </style:style>
    <style:style style:name="col_rag_2" style:family="table-column">
      <style:table-column-properties style:column-width="7.0cm"/>
    </style:style>
    <style:style style:name="col_rag_3" style:family="table-column">
      <style:table-column-properties style:column-width="2.0cm"/>
    </style:style>
    <style:style style:name="col_risks_0" style:family="table-column">
      <style:table-column-properties style:column-width="1.2cm"/>
    </style:style>
    <style:style style:name="col_risks_1" style:family="table-column">
      <style:table-column-properties style:column-width="8.5cm"/>
    </style:style>
    <style:style style:name="col_risks_2" style:family="table-column">
      <style:table-column-properties style:column-width="5.7cm"/>
    </style:style>
    <style:style style:name="col_dead_0" style:family="table-column">
      <style:table-column-properties style:column-width="3.5cm"/>
    </style:style>
    <style:style style:name="col_dead_1" style:family="table-column">
      <style:table-column-properties style:column-width="8.5cm"/>
    </style:style>
    <style:style style:name="col_dead_2" style:family="table-column">
      <style:table-column-properties style:column-width="3.4cm"/>
    </style:style>
    <style:style style:name="col_kpi_0" style:family="table-column">
      <style:table-column-properties style:column-width="5.5cm"/>
    </style:style>
    <style:style style:name="col_kpi_1" style:family="table-column">
      <style:table-column-properties style:column-width="3.0cm"/>
    </style:style>
    <style:style style:name="col_kpi_2" style:family="table-column">
      <style:table-column-properties style:column-width="7.0cm"/>
    </style:style>
    <style:style style:name="TCHeader" style:family="table-cell">
      <style:table-cell-properties fo:background-color="#1F3864" fo:padding="0.15cm" fo:border="0.05cm solid #FFFFFF"/>
    </style:style>
    <style:style style:name="TCBody" style:family="table-cell">
      <style:table-cell-properties fo:padding="0.12cm" fo:border="0.03cm solid #CCCCCC"/>
    </style:style>
    <style:style style:name="TCBodyAlt" style:family="table-cell">
      <style:table-cell-properties fo:background-color="#F2F4F8" fo:padding="0.12cm" fo:border="0.03cm solid #CCCCCC"/>
    </style:style>
    <style:style style:name="TCRed" style:family="table-cell">
      <style:table-cell-properties fo:background-color="#FADBD8" fo:padding="0.12cm" fo:border="0.03cm solid #CCCCCC"/>
    </style:style>
    <style:style style:name="TCAmber" style:family="table-cell">
      <style:table-cell-properties fo:background-color="#FDEBD0" fo:padding="0.12cm" fo:border="0.03cm solid #CCCCCC"/>
    </style:style>
    <style:style style:name="TCGreen" style:family="table-cell">
      <style:table-cell-properties fo:background-color="#D5F5E3" fo:padding="0.12cm" fo:border="0.03cm solid #CCCCCC"/>
    </style:style>
  </office:automatic-styles>
  <office:body>
    <office:text>
      <text:p text:style-name="Cover_20_Title">RÉSUMÉ EXÉCUTIF</text:p>
      <text:p text:style-name="Cover_20_Subtitle">PetFactory Maroc — Usine d'Aliments pour Animaux</text:p>
      <text:p text:style-name="Cover_20_Subtitle">Sidi Bouathmane, Maroc</text:p>
      <text:p text:style-name="Text_20_Body"/>
      <text:p text:style-name="Cover_20_Meta">Date : 25 juin 2026</text:p>
      <text:p text:style-name="Cover_20_Meta">Chef de Projet : Sam Aribi</text:p>
      <text:p text:style-name="Cover_20_Meta">Rapport hebdomadaire — Semaine 26, 2026</text:p>
      <text:p text:style-name="Cover_20_Meta">Source : PetFactoryMaroc_ProjectTracker.xlsx (mise à jour : 23/06/2026)</text:p>
      <text:p text:style-name="Separator"/>
      <text:h text:style-name="Heading_20_1" text:outline-level="1">1. Contexte du Projet</text:h>
      <text:p text:style-name="Text_20_Body">PetFactory Maroc est une usine de fabrication d'aliments pour animaux en cours de construction à Sidi Bouathmane, Maroc. L'usine intègre 7 systèmes industriels principaux dont la ligne de production pilotée par FAMSUN (équipementier chinois), les utilités (chaudière, air comprimé, eau industrielle), la manutention (pont-bascule, élévateurs, cuve huile) et l'installation électrique. La mise en service complète est ciblée au 24 novembre 2026.</text:p>
      <text:p text:style-name="Text_20_Body"/>
      <text:h text:style-name="Heading_20_1" text:outline-level="1">2. Synthèse de l'Avancement Global</text:h>
      <text:p text:style-name="Text_20_Body"><text:span text:style-name="Bold">Avancement global pondéré : 24,2 %</text:span> (24 tâches terminées / 14 en cours / 90 non démarrées sur 128 total).</text:p>
      <text:p text:style-name="Text_20_Body"/>
      <text:p text:style-name="Alert"><text:span text:style-name="RAG_Red">  ALERTE CRITIQUE  </text:span>  La Cuve de Stockage d'Huile (2 × 20 000 L) est le seul système en statut <text:span text:style-name="RAG_Red">ROUGE</text:span> : avancement de seulement 4,2 %, avec la revue des spécifications (Annexe D) bloquée depuis le 21 avril 2026 (retard de +8 semaines). Tous les autres systèmes sont <text:span text:style-name="RAG_Amber">ORANGE</text:span>, à l'exception du Transformateur électrique qui est le seul système <text:span text:style-name="RAG_Green">VERT</text:span> (bon de commande signé).</text:p>
      <text:p text:style-name="Text_20_Body"/>
      <table:table table:name="kpi" table:style-name="Table_20_Default">
        <table:table-column table:style-name="col_kpi_0"/>
        <table:table-column table:style-name="col_kpi_1"/>
        <table:table-column table:style-name="col_kpi_2"/>
        <table:table-row>
          <table:table-cell table:style-name="TCHeader" office:value-type="string">
            <text:p text:style-name="Table_20_Contents"><text:span text:style-name="Bold">Indicateur</text:span></text:p>
          </table:table-cell>
          <table:table-cell table:style-name="TCHeader" office:value-type="string">
            <text:p text:style-name="Table_20_Contents"><text:span text:style-name="Bold">Valeur</text:span></text:p>
          </table:table-cell>
          <table:table-cell table:style-name="TCHeader" office:value-type="string">
            <text:p text:style-name="Table_20_Contents"><text:span text:style-name="Bold">Remarque</text:span></text:p>
          </table:table-cell>
        </table:table-row>
        <table:table-row>
          <table:table-cell table:style-name="TCBody" office:value-type="string">
            <text:p text:style-name="Table_20_Contents">Total des tâches suivies</text:p>
          </table:table-cell>
          <table:table-cell table:style-name="TCBody" office:value-type="string">
            <text:p text:style-name="Table_20_Contents"><text:span text:style-name="Bold">128</text:span></text:p>
          </table:table-cell>
          <table:table-cell table:style-name="TCBody" office:value-type="string">
            <text:p text:style-name="Table_20_Contents">—</text:p>
          </table:table-cell>
        </table:table-row>
        <table:table-row>
          <table:table-cell table:style-name="TCBodyAlt" office:value-type="string">
            <text:p text:style-name="Table_20_Contents">Tâches terminées</text:p>
          </table:table-cell>
          <table:table-cell table:style-name="TCBodyAlt" office:value-type="string">
            <text:p text:style-name="Table_20_Contents"><text:span text:style-name="Bold">24</text:span></text:p>
          </table:table-cell>
          <table:table-cell table:style-name="TCBodyAlt" office:value-type="string">
            <text:p text:style-name="Table_20_Contents">18,75 %</text:p>
          </table:table-cell>
        </table:table-row>
        <table:table-row>
          <table:table-cell table:style-name="TCBody" office:value-type="string">
            <text:p text:style-name="Table_20_Contents">Tâches en cours</text:p>
          </table:table-cell>
          <table:table-cell table:style-name="TCBody" office:value-type="string">
            <text:p text:style-name="Table_20_Contents"><text:span text:style-name="Bold">14</text:span></text:p>
          </table:table-cell>
          <table:table-cell table:style-name="TCBody" office:value-type="string">
            <text:p text:style-name="Table_20_Contents">10,94 %</text:p>
          </table:table-cell>
        </table:table-row>
        <table:table-row>
          <table:table-cell table:style-name="TCBodyAlt" office:value-type="string">
            <text:p text:style-name="Table_20_Contents">Tâches non démarrées</text:p>
          </table:table-cell>
          <table:table-cell table:style-name="TCBodyAlt" office:value-type="string">
            <text:p text:style-name="Table_20_Contents"><text:span text:style-name="Bold">90</text:span></text:p>
          </table:table-cell>
          <table:table-cell table:style-name="TCBodyAlt" office:value-type="string">
            <text:p text:style-name="Table_20_Contents">70,31 %</text:p>
          </table:table-cell>
        </table:table-row>
        <table:table-row>
          <table:table-cell table:style-name="TCBody" office:value-type="string">
            <text:p text:style-name="Table_20_Contents">Avancement global pondéré</text:p>
          </table:table-cell>
          <table:table-cell table:style-name="TCBody" office:value-type="string">
            <text:p text:style-name="Table_20_Contents"><text:span text:style-name="Bold">24,2 %</text:span></text:p>
          </table:table-cell>
          <table:table-cell table:style-name="TCBody" office:value-type="string">
            <text:p text:style-name="Table_20_Contents">Terminé = 100 %, En cours = 50 %</text:p>
          </table:table-cell>
        </table:table-row>
        <table:table-row>
          <table:table-cell table:style-name="TCBodyAlt" office:value-type="string">
            <text:p text:style-name="Table_20_Contents">Jalons critiques passés</text:p>
          </table:table-cell>
          <table:table-cell table:style-name="TCBodyAlt" office:value-type="string">
            <text:p text:style-name="Table_20_Contents"><text:span text:style-name="Bold">1 / 7</text:span></text:p>
          </table:table-cell>
          <table:table-cell table:style-name="TCBodyAlt" office:value-type="string">
            <text:p text:style-name="Table_20_Contents">FAMSUN Drawing Review (mai 2026)</text:p>
          </table:table-cell>
        </table:table-row>
        <table:table-row>
          <table:table-cell table:style-name="TCBody" office:value-type="string">
            <text:p text:style-name="Table_20_Contents">Prochain jalon critique</text:p>
          </table:table-cell>
          <table:table-cell table:style-name="TCBody" office:value-type="string">
            <text:p text:style-name="Table_20_Contents"><text:span text:style-name="Bold">11 juillet 2026</text:span></text:p>
          </table:table-cell>
          <table:table-cell table:style-name="TCBody" office:value-type="string">
            <text:p text:style-name="Table_20_Contents">Finalisation fournisseurs × 3</text:p>
          </table:table-cell>
        </table:table-row>
        <table:table-row>
          <table:table-cell table:style-name="TCBodyAlt" office:value-type="string">
            <text:p text:style-name="Table_20_Contents">Mise en service cible</text:p>
          </table:table-cell>
          <table:table-cell table:style-name="TCBodyAlt" office:value-type="string">
            <text:p text:style-name="Table_20_Contents"><text:span text:style-name="Bold">24 novembre 2026</text:span></text:p>
          </table:table-cell>
          <table:table-cell table:style-name="TCBodyAlt" office:value-type="string">
            <text:p text:style-name="Table_20_Contents">Toutes installations &amp; tests</text:p>
          </table:table-cell>
        </table:table-row>
        <table:table-row>
          <table:table-cell table:style-name="TCBody" office:value-type="string">
            <text:p text:style-name="Table_20_Contents">Systèmes en ROUGE</text:p>
          </table:table-cell>
          <table:table-cell table:style-name="TCBody" office:value-type="string">
            <text:p text:style-name="Table_20_Contents"><text:span text:style-name="Bold">1</text:span></text:p>
          </table:table-cell>
          <table:table-cell table:style-name="TCBody" office:value-type="string">
            <text:p text:style-name="Table_20_Contents">Cuve de stockage huile</text:p>
          </table:table-cell>
        </table:table-row>
        <table:table-row>
          <table:table-cell table:style-name="TCBodyAlt" office:value-type="string">
            <text:p text:style-name="Table_20_Contents">Systèmes en ORANGE</text:p>
          </table:table-cell>
          <table:table-cell table:style-name="TCBodyAlt" office:value-type="string">
            <text:p text:style-name="Table_20_Contents"><text:span text:style-name="Bold">6</text:span></text:p>
          </table:table-cell>
          <table:table-cell table:style-name="TCBodyAlt" office:value-type="string">
            <text:p text:style-name="Table_20_Contents">Chaudière, Compresseurs, Eau, Silo, Pont-bascule, Élévateurs</text:p>
          </table:table-cell>
        </table:table-row>
        <table:table-row>
          <table:table-cell table:style-name="TCBody" office:value-type="string">
            <text:p text:style-name="Table_20_Contents">Systèmes en VERT</text:p>
          </table:table-cell>
          <table:table-cell table:style-name="TCBody" office:value-type="string">
            <text:p text:style-name="Table_20_Contents"><text:span text:style-name="Bold">1</text:span></text:p>
          </table:table-cell>
          <table:table-cell table:style-name="TCBody" office:value-type="string">
            <text:p text:style-name="Table_20_Contents">Électricité / Transformateur</text:p>
          </table:table-cell>
        </table:table-row>
      </table:table>
      <text:p text:style-name="Text_20_Body"/>
      <text:h text:style-name="Heading_20_1" text:outline-level="1">3. Statut RAG — 7 Systèmes Principaux</text:h>
      <table:table table:name="rag" table:style-name="Table_20_Default">
        <table:table-column table:style-name="col_rag_0"/>
        <table:table-column table:style-name="col_rag_1"/>
        <table:table-column table:style-name="col_rag_2"/>
        <table:table-column table:style-name="col_rag_3"/>
        <table:table-column table:style-name="col_rag_4"/>
        <table:table-row>
          <table:table-cell table:style-name="TCHeader" office:value-type="string">
            <text:p text:style-name="Table_20_Contents"><text:span text:style-name="Bold">Système</text:span></text:p>
          </table:table-cell>
          <table:table-cell table:style-name="TCHeader" office:value-type="string">
            <text:p text:style-name="Table_20_Contents"><text:span text:style-name="Bold">Spécification</text:span></text:p>
          </table:table-cell>
          <table:table-cell table:style-name="TCHeader" office:value-type="string">
            <text:p text:style-name="Table_20_Contents"><text:span text:style-name="Bold">Avancement</text:span></text:p>
          </table:table-cell>
          <table:table-cell table:style-name="TCHeader" office:value-type="string">
            <text:p text:style-name="Table_20_Contents"><text:span text:style-name="Bold">Statut résumé</text:span></text:p>
          </table:table-cell>
          <table:table-cell table:style-name="TCHeader" office:value-type="string">
            <text:p text:style-name="Table_20_Contents"><text:span text:style-name="Bold">RAG</text:span></text:p>
          </table:table-cell>
        </table:table-row>
        <table:table-row>
          <table:table-cell table:style-name="TCBody" office:value-type="string">
            <text:p text:style-name="Table_20_Contents"><text:span text:style-name="Bold">1. Chaudière</text:span></text:p>
          </table:table-cell>
          <table:table-cell table:style-name="TCBody" office:value-type="string">
            <text:p text:style-name="Table_20_Contents">6 000 Kg/H</text:p>
          </table:table-cell>
          <table:table-cell table:style-name="TCBody" office:value-type="string">
            <text:p text:style-name="Table_20_Contents">17,9%</text:p>
          </table:table-cell>
          <table:table-cell table:style-name="TCBody" office:value-type="string">
            <text:p text:style-name="Table_20_Contents">Spécifications validées. Sélection fournisseur en cours (échéance 11/07). Fondations civiles dues le 18/06 — NON DÉMARRÉES.</text:p>
          </table:table-cell>
          <table:table-cell table:style-name="TCAmber" office:value-type="string">
            <text:p text:style-name="Table_20_Contents"><text:span text:style-name="RAG_Amber">  ORANGE  </text:span></text:p>
          </table:table-cell>
        </table:table-row>
        <table:table-row>
          <table:table-cell table:style-name="TCBodyAlt" office:value-type="string">
            <text:p text:style-name="Table_20_Contents"><text:span text:style-name="Bold">2. Compresseurs</text:span></text:p>
          </table:table-cell>
          <table:table-cell table:style-name="TCBodyAlt" office:value-type="string">
            <text:p text:style-name="Table_20_Contents">37 kW × 2</text:p>
          </table:table-cell>
          <table:table-cell table:style-name="TCBodyAlt" office:value-type="string">
            <text:p text:style-name="Table_20_Contents">19,2%</text:p>
          </table:table-cell>
          <table:table-cell table:style-name="TCBodyAlt" office:value-type="string">
            <text:p text:style-name="Table_20_Contents">Ingénierie complète. Sélection fournisseur en cours (échéance 11/07). Salle compresseurs non préparée (échue le 18/06).</text:p>
          </table:table-cell>
          <table:table-cell table:style-name="TCAmber" office:value-type="string">
            <text:p text:style-name="Table_20_Contents"><text:span text:style-name="RAG_Amber">  ORANGE  </text:span></text:p>
          </table:table-cell>
        </table:table-row>
        <table:table-row>
          <table:table-cell table:style-name="TCBody" office:value-type="string">
            <text:p text:style-name="Table_20_Contents"><text:span text:style-name="Bold">3. Réseau d'eau</text:span></text:p>
          </table:table-cell>
          <table:table-cell table:style-name="TCBody" office:value-type="string">
            <text:p text:style-name="Table_20_Contents">10 000 Kg/H</text:p>
          </table:table-cell>
          <table:table-cell table:style-name="TCBody" office:value-type="string">
            <text:p text:style-name="Table_20_Contents">20,8%</text:p>
          </table:table-cell>
          <table:table-cell table:style-name="TCBody" office:value-type="string">
            <text:p text:style-name="Table_20_Contents">Conception validée. Sélection pompes/cuves démarre le 11/07. Fouilles/civil dues le 18/06 — NON DÉMARRÉES.</text:p>
          </table:table-cell>
          <table:table-cell table:style-name="TCAmber" office:value-type="string">
            <text:p text:style-name="Table_20_Contents"><text:span text:style-name="RAG_Amber">  ORANGE  </text:span></text:p>
          </table:table-cell>
        </table:table-row>
        <table:table-row>
          <table:table-cell table:style-name="TCBodyAlt" office:value-type="string">
            <text:p text:style-name="Table_20_Contents"><text:span text:style-name="Bold">4. Silo</text:span></text:p>
          </table:table-cell>
          <table:table-cell table:style-name="TCBodyAlt" office:value-type="string">
            <text:p text:style-name="Table_20_Contents">Périmètre FAMSUN</text:p>
          </table:table-cell>
          <table:table-cell table:style-name="TCBodyAlt" office:value-type="string">
            <text:p text:style-name="Table_20_Contents">N/D</text:p>
          </table:table-cell>
          <table:table-cell table:style-name="TCBodyAlt" office:value-type="string">
            <text:p text:style-name="Table_20_Contents">Couvert par le lot FAMSUN (équipe chinoise). Planning disponible. Visibilité limitée — aucun suivi indépendant.</text:p>
          </table:table-cell>
          <table:table-cell table:style-name="TCAmber" office:value-type="string">
            <text:p text:style-name="Table_20_Contents"><text:span text:style-name="RAG_Amber">  ORANGE  </text:span></text:p>
          </table:table-cell>
        </table:table-row>
        <table:table-row>
          <table:table-cell table:style-name="TCBody" office:value-type="string">
            <text:p text:style-name="Table_20_Contents"><text:span text:style-name="Bold">5. Pont-bascule</text:span></text:p>
          </table:table-cell>
          <table:table-cell table:style-name="TCBody" office:value-type="string">
            <text:p text:style-name="Table_20_Contents">60 T</text:p>
          </table:table-cell>
          <table:table-cell table:style-name="TCBody" office:value-type="string">
            <text:p text:style-name="Table_20_Contents">25,0%</text:p>
          </table:table-cell>
          <table:table-cell table:style-name="TCBody" office:value-type="string">
            <text:p text:style-name="Table_20_Contents">Système le plus avancé. Fournisseur sélectionné. BC en cours. Fondation due le 18/06 — NON DÉMARRÉE. Métrologie légale à planifier.</text:p>
          </table:table-cell>
          <table:table-cell table:style-name="TCAmber" office:value-type="string">
            <text:p text:style-name="Table_20_Contents"><text:span text:style-name="RAG_Amber">  ORANGE  </text:span></text:p>
          </table:table-cell>
        </table:table-row>
        <table:table-row>
          <table:table-cell table:style-name="TCBodyAlt" office:value-type="string">
            <text:p text:style-name="Table_20_Contents"><text:span text:style-name="Bold">6. Cuve huile</text:span></text:p>
          </table:table-cell>
          <table:table-cell table:style-name="TCBodyAlt" office:value-type="string">
            <text:p text:style-name="Table_20_Contents">2 × 20 000 L</text:p>
          </table:table-cell>
          <table:table-cell table:style-name="TCBodyAlt" office:value-type="string">
            <text:p text:style-name="Table_20_Contents">4,2%</text:p>
          </table:table-cell>
          <table:table-cell table:style-name="TCBodyAlt" office:value-type="string">
            <text:p text:style-name="Table_20_Contents">CRITIQUE. Revue specs (Annexe D) toujours en cours depuis le 21/04 (+8 sem. de retard). Fournisseur non sélectionné. BC non émis. Radier non démarré (dû le 02/06). Permis transport hors gabarit non initié.</text:p>
          </table:table-cell>
          <table:table-cell table:style-name="TCRed" office:value-type="string">
            <text:p text:style-name="Table_20_Contents"><text:span text:style-name="RAG_Red">  ROUGE  </text:span></text:p>
          </table:table-cell>
        </table:table-row>
        <table:table-row>
          <table:table-cell table:style-name="TCBody" office:value-type="string">
            <text:p text:style-name="Table_20_Contents"><text:span text:style-name="Bold">7. Élévateurs</text:span></text:p>
          </table:table-cell>
          <table:table-cell table:style-name="TCBody" office:value-type="string">
            <text:p text:style-name="Table_20_Contents">2 × 2 T</text:p>
          </table:table-cell>
          <table:table-cell table:style-name="TCBody" office:value-type="string">
            <text:p text:style-name="Table_20_Contents">17,9%</text:p>
          </table:table-cell>
          <table:table-cell table:style-name="TCBody" office:value-type="string">
            <text:p text:style-name="Table_20_Contents">Conception validée. Sélection fournisseur en cours (échéance 11/07). Gaine/structure due le 18/06 — NON DÉMARRÉE. Installateur certifié requis.</text:p>
          </table:table-cell>
          <table:table-cell table:style-name="TCAmber" office:value-type="string">
            <text:p text:style-name="Table_20_Contents"><text:span text:style-name="RAG_Amber">  ORANGE  </text:span></text:p>
          </table:table-cell>
        </table:table-row>
        <table:table-row>
          <table:table-cell table:style-name="TCBodyAlt" office:value-type="string">
            <text:p text:style-name="Table_20_Contents"><text:span text:style-name="Bold">Électricité/Transfo</text:span></text:p>
          </table:table-cell>
          <table:table-cell table:style-name="TCBodyAlt" office:value-type="string">
            <text:p text:style-name="Table_20_Contents">1 600 KVA</text:p>
          </table:table-cell>
          <table:table-cell table:style-name="TCBodyAlt" office:value-type="string">
            <text:p text:style-name="Table_20_Contents">33,3%</text:p>
          </table:table-cell>
          <table:table-cell table:style-name="TCBodyAlt" office:value-type="string">
            <text:p text:style-name="Table_20_Contents">Seul système avec BC signé (11–14/06). Fabrication démarre le 01/07 (délai 12 semaines).</text:p>
          </table:table-cell>
          <table:table-cell table:style-name="TCGreen" office:value-type="string">
            <text:p text:style-name="Table_20_Contents"><text:span text:style-name="RAG_Green">  VERT  </text:span></text:p>
          </table:table-cell>
        </table:table-row>
      </table:table>
      <text:p text:style-name="Text_20_Body"/>
      <text:h text:style-name="Heading_20_1" text:outline-level="1">4. Risques Principaux</text:h>
      <table:table table:name="risks" table:style-name="Table_20_Default">
        <table:table-column table:style-name="col_risks_0"/>
        <table:table-column table:style-name="col_risks_1"/>
        <table:table-column table:style-name="col_risks_2"/>
        <table:table-row>
          <table:table-cell table:style-name="TCHeader" office:value-type="string">
            <text:p text:style-name="Table_20_Contents"><text:span text:style-name="Bold">N°</text:span></text:p>
          </table:table-cell>
          <table:table-cell table:style-name="TCHeader" office:value-type="string">
            <text:p text:style-name="Table_20_Contents"><text:span text:style-name="Bold">Description du risque</text:span></text:p>
          </table:table-cell>
          <table:table-cell table:style-name="TCHeader" office:value-type="string">
            <text:p text:style-name="Table_20_Contents"><text:span text:style-name="Bold">Impact</text:span></text:p>
          </table:table-cell>
        </table:table-row>
        <table:table-row>
          <table:table-cell table:style-name="TCBody" office:value-type="string">
            <text:p text:style-name="Table_20_Contents"><text:span text:style-name="Bold">1</text:span></text:p>
          </table:table-cell>
          <table:table-cell table:style-name="TCBody" office:value-type="string">
            <text:p text:style-name="Table_20_Contents">CUVE HUILE (ROUGE) — Revue Annexe D non clôturée depuis le 21/04 (+8 sem.). Fournisseur non sélectionné, BC non émis, radier non démarré (dû le 02/06), fabrication (8 sem.) et permis transport non initiés.</text:p>
          </table:table-cell>
          <table:table-cell table:style-name="TCBody" office:value-type="string">
            <text:p text:style-name="Table_20_Contents">CRITIQUE — menace l'ensemble du calendrier de mise en service</text:p>
          </table:table-cell>
        </table:table-row>
        <table:table-row>
          <table:table-cell table:style-name="TCBodyAlt" office:value-type="string">
            <text:p text:style-name="Table_20_Contents"><text:span text:style-name="Bold">2</text:span></text:p>
          </table:table-cell>
          <table:table-cell table:style-name="TCBodyAlt" office:value-type="string">
            <text:p text:style-name="Table_20_Contents">TRAVAUX CIVILS NON DÉMARRÉS — Fondations Chaudière, Compresseurs, Pont-bascule, Gaine Élévateur, Fouilles Réseau eau : toutes dues le 18/06, toujours sans début d'exécution.</text:p>
          </table:table-cell>
          <table:table-cell table:style-name="TCBodyAlt" office:value-type="string">
            <text:p text:style-name="Table_20_Contents">ÉLEVÉ — sur le chemin critique de toutes les installations</text:p>
          </table:table-cell>
        </table:table-row>
        <table:table-row>
          <table:table-cell table:style-name="TCBody" office:value-type="string">
            <text:p text:style-name="Table_20_Contents"><text:span text:style-name="Bold">3</text:span></text:p>
          </table:table-cell>
          <table:table-cell table:style-name="TCBody" office:value-type="string">
            <text:p text:style-name="Table_20_Contents">ÉCHÉANCE FOURNISSEURS 11/07 — Chaudière, Compresseurs, Élévateurs : finalisation sous 16 jours. Fabrication doit démarrer le 18/07 pour respecter la fenêtre d'expédition du 18/09.</text:p>
          </table:table-cell>
          <table:table-cell table:style-name="TCBody" office:value-type="string">
            <text:p text:style-name="Table_20_Contents">ÉLEVÉ</text:p>
          </table:table-cell>
        </table:table-row>
        <table:table-row>
          <table:table-cell table:style-name="TCBodyAlt" office:value-type="string">
            <text:p text:style-name="Table_20_Contents"><text:span text:style-name="Bold">4</text:span></text:p>
          </table:table-cell>
          <table:table-cell table:style-name="TCBodyAlt" office:value-type="string">
            <text:p text:style-name="Table_20_Contents">SILO (FAMSUN) — Aucun suivi indépendant. Dépendance totale au calendrier de l'équipe chinoise. Dernière communication : planning d'avril 2026.</text:p>
          </table:table-cell>
          <table:table-cell table:style-name="TCBodyAlt" office:value-type="string">
            <text:p text:style-name="Table_20_Contents">MOYEN</text:p>
          </table:table-cell>
        </table:table-row>
        <table:table-row>
          <table:table-cell table:style-name="TCBody" office:value-type="string">
            <text:p text:style-name="Table_20_Contents"><text:span text:style-name="Bold">5</text:span></text:p>
          </table:table-cell>
          <table:table-cell table:style-name="TCBody" office:value-type="string">
            <text:p text:style-name="Table_20_Contents">SOLAIRE (0%) — Aucune tâche démarrée. Pas encore critique, mais aucun fournisseur ni conception initiés.</text:p>
          </table:table-cell>
          <table:table-cell table:style-name="TCBody" office:value-type="string">
            <text:p text:style-name="Table_20_Contents">FAIBLE à MOYEN</text:p>
          </table:table-cell>
        </table:table-row>
      </table:table>
      <text:p text:style-name="Text_20_Body"/>
      <text:h text:style-name="Heading_20_1" text:outline-level="1">5. Top 3 Actions Prioritaires</text:h>
      <text:h text:style-name="Heading_20_2" text:outline-level="2">Action 1 — [URGENT / ROUGE] Débloquer la Cuve de Stockage d'Huile</text:h>
      <text:p text:style-name="Text_20_Body">Échéance immédiate — cette semaine.</text:p>
      <text:p text:style-name="List_20_Bullet">• Clôturer la revue des spécifications (Annexe D) — bloquée depuis 21/04.</text:p>
      <text:p text:style-name="List_20_Bullet">• Sélectionner et confirmer le fournisseur cuve.</text:p>
      <text:p text:style-name="List_20_Bullet">• Émettre le bon de commande dès la confirmation fournisseur.</text:p>
      <text:p text:style-name="List_20_Bullet">• Mobiliser l'entreprise génie civil pour le radier/bund (dû le 02/06).</text:p>
      <text:p text:style-name="List_20_Bullet">• Initier la demande de permis transport hors gabarit.</text:p>
      <text:p text:style-name="Text_20_Body"/>
      <text:h text:style-name="Heading_20_2" text:outline-level="2">Action 2 — [ÉLEVÉ] Mobiliser l'entreprise de Génie Civil</text:h>
      <text:p text:style-name="Text_20_Body">Échéance immédiate — démarrage requis cette semaine.</text:p>
      <text:p text:style-name="Text_20_Body">Les fondations/préparations civiles de 5 systèmes étaient planifiées au 18/06 et n'ont toujours pas démarré : Chaudière, Compresseurs, Pont-bascule, Gaine Élévateur, Fouilles Réseau d'eau. Chaque jour de retard comprime le calendrier d'installation de novembre.</text:p>
      <text:p text:style-name="Text_20_Body"/>
      <text:h text:style-name="Heading_20_2" text:outline-level="2">Action 3 — [ÉLEVÉ] Clôturer la Sélection Fournisseurs avant le 11 juillet</text:h>
      <text:p text:style-name="Text_20_Body">Délai : 16 jours.</text:p>
      <text:p text:style-name="List_20_Bullet">• Chaudière : facture proforma ENERGIE MANAGEMENT (#00162026) disponible — confirmer si sélectionnée ou si évaluation encore en cours.</text:p>
      <text:p text:style-name="List_20_Bullet">• Compresseurs et Élévateurs : finaliser les conditions commerciales et délais de fabrication.</text:p>
      <text:p text:style-name="List_20_Bullet">• Émettre les bons de commande la semaine du 14/07 au plus tard pour respecter la fenêtre d'expédition maritime du 18/09.</text:p>
      <text:p text:style-name="Text_20_Body"/>
      <text:h text:style-name="Heading_20_1" text:outline-level="1">6. Échéancier — Jalons à 5 Mois</text:h>
      <table:table table:name="dead" table:style-name="Table_20_Default">
        <table:table-column table:style-name="col_dead_0"/>
        <table:table-column table:style-name="col_dead_1"/>
        <table:table-column table:style-name="col_dead_2"/>
        <table:table-row>
          <table:table-cell table:style-name="TCHeader" office:value-type="string">
            <text:p text:style-name="Table_20_Contents"><text:span text:style-name="Bold">Date</text:span></text:p>
          </table:table-cell>
          <table:table-cell table:style-name="TCHeader" office:value-type="string">
            <text:p text:style-name="Table_20_Contents"><text:span text:style-name="Bold">Jalons</text:span></text:p>
          </table:table-cell>
          <table:table-cell table:style-name="TCHeader" office:value-type="string">
            <text:p text:style-name="Table_20_Contents"><text:span text:style-name="Bold">Statut</text:span></text:p>
          </table:table-cell>
        </table:table-row>
        <table:table-row>
          <table:table-cell table:style-name="TCBody" office:value-type="string">
            <text:p text:style-name="Table_20_Contents"><text:span text:style-name="Bold">18/06/2026 (ÉCHU)</text:span></text:p>
          </table:table-cell>
          <table:table-cell table:style-name="TCBody" office:value-type="string">
            <text:p text:style-name="Table_20_Contents">Démarrage des travaux civils — Chaudière, Compresseurs, Pont-bascule, Élévateur, Réseau eau</text:p>
          </table:table-cell>
          <table:table-cell table:style-name="TCBody" office:value-type="string">
            <text:p text:style-name="Table_20_Contents">NON DÉMARRÉ</text:p>
          </table:table-cell>
        </table:table-row>
        <table:table-row>
          <table:table-cell table:style-name="TCBodyAlt" office:value-type="string">
            <text:p text:style-name="Table_20_Contents">01/07/2026</text:p>
          </table:table-cell>
          <table:table-cell table:style-name="TCBodyAlt" office:value-type="string">
            <text:p text:style-name="Table_20_Contents">Démarrage fabrication Transformateur électrique (délai 12 sem.)</text:p>
          </table:table-cell>
          <table:table-cell table:style-name="TCBodyAlt" office:value-type="string">
            <text:p text:style-name="Table_20_Contents">En cours — sur plan</text:p>
          </table:table-cell>
        </table:table-row>
        <table:table-row>
          <table:table-cell table:style-name="TCBody" office:value-type="string">
            <text:p text:style-name="Table_20_Contents">07/07/2026 (À RISQUE)</text:p>
          </table:table-cell>
          <table:table-cell table:style-name="TCBody" office:value-type="string">
            <text:p text:style-name="Table_20_Contents">Initiation permis transport hors gabarit — Cuve huile</text:p>
          </table:table-cell>
          <table:table-cell table:style-name="TCBody" office:value-type="string">
            <text:p text:style-name="Table_20_Contents">NON INITIÉ</text:p>
          </table:table-cell>
        </table:table-row>
        <table:table-row>
          <table:table-cell table:style-name="TCBodyAlt" office:value-type="string">
            <text:p text:style-name="Table_20_Contents"><text:span text:style-name="Bold">11/07/2026 (CRITIQUE)</text:span></text:p>
          </table:table-cell>
          <table:table-cell table:style-name="TCBodyAlt" office:value-type="string">
            <text:p text:style-name="Table_20_Contents">Finalisation fournisseurs : Chaudière + Compresseurs + Élévateurs</text:p>
          </table:table-cell>
          <table:table-cell table:style-name="TCBodyAlt" office:value-type="string">
            <text:p text:style-name="Table_20_Contents">En cours</text:p>
          </table:table-cell>
        </table:table-row>
        <table:table-row>
          <table:table-cell table:style-name="TCBody" office:value-type="string">
            <text:p text:style-name="Table_20_Contents">11/07/2026</text:p>
          </table:table-cell>
          <table:table-cell table:style-name="TCBody" office:value-type="string">
            <text:p text:style-name="Table_20_Contents">Finalisation entretiens recrutement (Resp. technique &amp; qualité)</text:p>
          </table:table-cell>
          <table:table-cell table:style-name="TCBody" office:value-type="string">
            <text:p text:style-name="Table_20_Contents">En cours</text:p>
          </table:table-cell>
        </table:table-row>
        <table:table-row>
          <table:table-cell table:style-name="TCBodyAlt" office:value-type="string">
            <text:p text:style-name="Table_20_Contents">18/07/2026</text:p>
          </table:table-cell>
          <table:table-cell table:style-name="TCBodyAlt" office:value-type="string">
            <text:p text:style-name="Table_20_Contents">Sélection pompes/cuves — Réseau d'eau</text:p>
          </table:table-cell>
          <table:table-cell table:style-name="TCBodyAlt" office:value-type="string">
            <text:p text:style-name="Table_20_Contents">À venir</text:p>
          </table:table-cell>
        </table:table-row>
        <table:table-row>
          <table:table-cell table:style-name="TCBody" office:value-type="string">
            <text:p text:style-name="Table_20_Contents">21/07/2026</text:p>
          </table:table-cell>
          <table:table-cell table:style-name="TCBody" office:value-type="string">
            <text:p text:style-name="Table_20_Contents">Finalisation fournisseur Installation GAZ</text:p>
          </table:table-cell>
          <table:table-cell table:style-name="TCBody" office:value-type="string">
            <text:p text:style-name="Table_20_Contents">En cours</text:p>
          </table:table-cell>
        </table:table-row>
        <table:table-row>
          <table:table-cell table:style-name="TCBodyAlt" office:value-type="string">
            <text:p text:style-name="Table_20_Contents">18/08/2026</text:p>
          </table:table-cell>
          <table:table-cell table:style-name="TCBodyAlt" office:value-type="string">
            <text:p text:style-name="Table_20_Contents">Fabrication Chaudière &amp; Élévateurs terminée — expédition maritime</text:p>
          </table:table-cell>
          <table:table-cell table:style-name="TCBodyAlt" office:value-type="string">
            <text:p text:style-name="Table_20_Contents">Non démarré</text:p>
          </table:table-cell>
        </table:table-row>
        <table:table-row>
          <table:table-cell table:style-name="TCBody" office:value-type="string">
            <text:p text:style-name="Table_20_Contents">18/09/2026</text:p>
          </table:table-cell>
          <table:table-cell table:style-name="TCBody" office:value-type="string">
            <text:p text:style-name="Table_20_Contents">Expédition maritime majeure complète</text:p>
          </table:table-cell>
          <table:table-cell table:style-name="TCBody" office:value-type="string">
            <text:p text:style-name="Table_20_Contents">Non démarré</text:p>
          </table:table-cell>
        </table:table-row>
        <table:table-row>
          <table:table-cell table:style-name="TCBodyAlt" office:value-type="string">
            <text:p text:style-name="Table_20_Contents">28/10/2026</text:p>
          </table:table-cell>
          <table:table-cell table:style-name="TCBodyAlt" office:value-type="string">
            <text:p text:style-name="Table_20_Contents">Livraisons chantier complètes</text:p>
          </table:table-cell>
          <table:table-cell table:style-name="TCBodyAlt" office:value-type="string">
            <text:p text:style-name="Table_20_Contents">Non démarré</text:p>
          </table:table-cell>
        </table:table-row>
        <table:table-row>
          <table:table-cell table:style-name="TCBody" office:value-type="string">
            <text:p text:style-name="Table_20_Contents">24/11/2026</text:p>
          </table:table-cell>
          <table:table-cell table:style-name="TCBody" office:value-type="string">
            <text:p text:style-name="Table_20_Contents">Mise en service complète — Usine opérationnelle</text:p>
          </table:table-cell>
          <table:table-cell table:style-name="TCBody" office:value-type="string">
            <text:p text:style-name="Table_20_Contents">Non démarré</text:p>
          </table:table-cell>
        </table:table-row>
      </table:table>
      <text:p text:style-name="Text_20_Body"/>
      <text:h text:style-name="Heading_20_1" text:outline-level="1">7. Observations Documentaires</text:h>
      <text:p text:style-name="Text_20_Body">61 documents analysés dans les dossiers du projet. Points notables :</text:p>
      <text:p text:style-name="List_20_Bullet">• Dossier sécurité incendie complet (Soufiane Incendie/) : NSI ERT + plans PCI déposés.</text:p>
      <text:p text:style-name="List_20_Bullet">• Plans layout FAMSUN V08 disponibles (Mike's documents/) : vues multi-niveaux 0,00 m / +4,00 m / +8,50 m / +13,50 m.</text:p>
      <text:p text:style-name="List_20_Bullet">• CCTP et CPS spécifications techniques disponibles (General/).</text:p>
      <text:p text:style-name="List_20_Bullet">• Aucun nouveau document détecté dans les dossiers Silo, Pont-bascule, Cuve huile ou Réseau d'eau depuis la dernière revue.</text:p>
      <text:p text:style-name="List_20_Bullet">• Données Silo : uniquement planning équipe chinoise (avril 2026) et fiche caractéristiques — pas de mise à jour récente.</text:p>
      <text:p text:style-name="Text_20_Body"/>
      <text:p text:style-name="Separator"/>
      <text:p text:style-name="Footer">Document généré automatiquement le 25 juin 2026 — PetFactory Maroc Project Management System | Chef de Projet : Sam Aribi | Confidentiel</text:p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xmlns:svg="urn:oasis:names:tc:opendocument:xmlns:svg-compatible:1.0"
    office:version="1.2">

  <office:styles>

    <!-- PAGE LAYOUT -->
    <style:page-layout style:name="pm1">
      <style:page-layout-properties fo:page-width="21cm" fo:page-height="29.7cm"
          fo:margin-top="2cm" fo:margin-bottom="2cm"
          fo:margin-left="2.5cm" fo:margin-right="2.5cm"/>
    </style:page-layout>

    <!-- DEFAULT paragraph -->
    <style:style style:name="Default" style:family="paragraph" style:class="text">
      <style:paragraph-properties fo:line-height="1.15" fo:margin-bottom="0.2cm"/>
      <style:text-properties fo:font-size="10.5pt"
          style:font-name="Liberation Sans" fo:color="#1a1a1a"/>
    </style:style>

    <!-- BODY TEXT -->
    <style:style style:name="Text Body" style:display-name="Text Body"
        style:family="paragraph" style:parent-style-name="Default">
      <style:paragraph-properties fo:margin-top="0.1cm" fo:margin-bottom="0.15cm"/>
      <style:text-properties fo:font-size="10.5pt"/>
    </style:style>

    <!-- HEADINGS -->
    <style:style style:name="Heading 1" style:display-name="Heading 1"
        style:family="paragraph" style:parent-style-name="Default">
      <style:paragraph-properties fo:margin-top="0.5cm" fo:margin-bottom="0.3cm"
          fo:keep-with-next="always"/>
      <style:text-properties fo:font-size="17pt" fo:font-weight="bold"
          fo:color="#1F3864" style:font-name="Liberation Sans"/>
    </style:style>

    <style:style style:name="Heading 2" style:display-name="Heading 2"
        style:family="paragraph" style:parent-style-name="Default">
      <style:paragraph-properties fo:margin-top="0.4cm" fo:margin-bottom="0.2cm"
          fo:keep-with-next="always"
          fo:border-bottom="0.05cm solid #1F3864" fo:padding-bottom="0.1cm"/>
      <style:text-properties fo:font-size="12.5pt" fo:font-weight="bold"
          fo:color="#1F3864"/>
    </style:style>

    <style:style style:name="Heading 3" style:display-name="Heading 3"
        style:family="paragraph" style:parent-style-name="Default">
      <style:paragraph-properties fo:margin-top="0.3cm" fo:margin-bottom="0.1cm"/>
      <style:text-properties fo:font-size="11pt" fo:font-weight="bold"
          fo:color="#2E4057"/>
    </style:style>

    <!-- COVER TITLE -->
    <style:style style:name="Cover Title" style:display-name="Cover Title"
        style:family="paragraph" style:parent-style-name="Default">
      <style:paragraph-properties fo:text-align="center" fo:margin-top="3cm"
          fo:margin-bottom="0.5cm"/>
      <style:text-properties fo:font-size="22pt" fo:font-weight="bold"
          fo:color="#1F3864"/>
    </style:style>

    <style:style style:name="Cover Subtitle" style:display-name="Cover Subtitle"
        style:family="paragraph" style:parent-style-name="Default">
      <style:paragraph-properties fo:text-align="center" fo:margin-bottom="0.3cm"/>
      <style:text-properties fo:font-size="13pt" fo:color="#2E4057"/>
    </style:style>

    <style:style style:name="Cover Meta" style:display-name="Cover Meta"
        style:family="paragraph" style:parent-style-name="Default">
      <style:paragraph-properties fo:text-align="center" fo:margin-bottom="0.15cm"/>
      <style:text-properties fo:font-size="10.5pt" fo:color="#555555"/>
    </style:style>

    <!-- SEPARATOR -->
    <style:style style:name="Separator" style:display-name="Separator"
        style:family="paragraph" style:parent-style-name="Default">
      <style:paragraph-properties fo:border-bottom="0.05cm solid #CCCCCC"
          fo:margin-top="0.3cm" fo:margin-bottom="0.3cm" fo:padding-bottom="0.1cm"/>
    </style:style>

    <!-- BULLET -->
    <style:style style:name="List Bullet" style:display-name="List Bullet"
        style:family="paragraph" style:parent-style-name="Default">
      <style:paragraph-properties fo:margin-left="0.8cm" fo:text-indent="-0.4cm"
          fo:margin-bottom="0.1cm"/>
    </style:style>

    <!-- CALLOUT BOX -->
    <style:style style:name="Callout" style:display-name="Callout"
        style:family="paragraph" style:parent-style-name="Default">
      <style:paragraph-properties fo:background-color="#EBF3FB"
          fo:padding="0.25cm" fo:margin-bottom="0.3cm"
          fo:border="0.05cm solid #AED6F1"/>
      <style:text-properties fo:font-size="10.5pt" fo:color="#1a1a1a"/>
    </style:style>

    <!-- ALERT BOX -->
    <style:style style:name="Alert" style:display-name="Alert"
        style:family="paragraph" style:parent-style-name="Default">
      <style:paragraph-properties fo:background-color="#FDEDEC"
          fo:padding="0.25cm" fo:margin-bottom="0.3cm"
          fo:border="0.05cm solid #E74C3C"/>
      <style:text-properties fo:font-size="10.5pt" fo:color="#922B21"/>
    </style:style>

    <!-- TABLE STYLES -->
    <style:style style:name="Table Default" style:display-name="Table Default"
        style:family="table">
      <style:table-properties style:width="16cm" fo:margin-bottom="0.4cm"
          table:border-model="collapsing"/>
    </style:style>

    <style:style style:name="Table Header" style:display-name="Table Header"
        style:family="table-cell">
      <style:table-cell-properties fo:background-color="#1F3864"
          fo:padding="0.15cm" fo:border="0.05cm solid #FFFFFF"/>
    </style:style>

    <style:style style:name="Table Contents" style:display-name="Table Contents"
        style:family="table-cell">
      <style:table-cell-properties fo:padding="0.12cm"
          fo:border="0.03cm solid #CCCCCC"/>
    </style:style>

    <style:style style:name="Table Contents Alt" style:display-name="Table Contents Alt"
        style:family="table-cell">
      <style:table-cell-properties fo:background-color="#F2F4F8"
          fo:padding="0.12cm" fo:border="0.03cm solid #CCCCCC"/>
    </style:style>

    <!-- TEXT SPANS -->
    <style:style style:name="Bold" style:family="text">
      <style:text-properties fo:font-weight="bold"/>
    </style:style>

    <style:style style:name="RAG_Red" style:family="text">
      <style:text-properties fo:font-weight="bold" fo:color="#C0392B"
          fo:background-color="#FADBD8"/>
    </style:style>

    <style:style style:name="RAG_Amber" style:family="text">
      <style:text-properties fo:font-weight="bold" fo:color="#784212"
          fo:background-color="#FDEBD0"/>
    </style:style>

    <style:style style:name="RAG_Green" style:family="text">
      <style:text-properties fo:font-weight="bold" fo:color="#1E8449"
          fo:background-color="#D5F5E3"/>
    </style:style>

    <!-- TABLE PARAGRAPH STYLES -->
    <style:style style:name="Table Contents" style:display-name="Table Contents (para)"
        style:family="paragraph" style:parent-style-name="Default">
      <style:paragraph-properties fo:margin-bottom="0"/>
      <style:text-properties fo:font-size="10pt"/>
    </style:style>

    <style:style style:name="Table Header Para" style:display-name="Table Header Para"
        style:family="paragraph" style:parent-style-name="Default">
      <style:paragraph-properties fo:margin-bottom="0"/>
      <style:text-properties fo:font-size="10pt" fo:font-weight="bold"
          fo:color="#FFFFFF"/>
    </style:style>

    <style:style style:name="Footer" style:display-name="Footer"
        style:family="paragraph" style:parent-style-name="Default">
      <style:paragraph-properties fo:text-align="center" fo:margin-top="0.3cm"/>
      <style:text-properties fo:font-size="8.5pt" fo:color="#888888"/>
    </style:style>

  </office:styles>

  <office:automatic-styles>
    <style:page-layout style:name="pm1">
      <style:page-layout-properties fo:page-width="21cm" fo:page-height="29.7cm"
          style:print-orientation="portrait"
          fo:margin-top="2cm" fo:margin-bottom="2cm"
          fo:margin-left="2.5cm" fo:margin-right="2.5cm"/>
    </style:page-layout>
  </office:automatic-styles>

  <office:master-styles>
    <style:master-page style:name="Standard" style:page-layout-name="pm1"/>
  </office:master-styles>

</office:document-styles>
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Résumé Exécutif — PetFactory Maroc</dc:title>
    <dc:creator>Sam Aribi — Chef de Projet</dc:creator>
    <dc:date>2026-06-25</dc:date>
    <dc:language>fr-MA</dc:language>
  </office:meta>
</office:document-meta>
</file>